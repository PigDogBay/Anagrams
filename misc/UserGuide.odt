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00000020071756C90.png" manifest:media-type="image/png"/>
  <manifest:file-entry manifest:full-path="Pictures/100000000000028000000200EFB86194.png" manifest:media-type="image/png"/>
  <manifest:file-entry manifest:full-path="Pictures/1000000000000280000002006B5829D3.png" manifest:media-type="image/png"/>
  <manifest:file-entry manifest:full-path="Pictures/10000000000002800000020078A685B7.png" manifest:media-type="image/png"/>
  <manifest:file-entry manifest:full-path="Pictures/100000000000028000000200789C31C7.png" manifest:media-type="image/png"/>
  <manifest:file-entry manifest:full-path="Pictures/100000000000028000000200DDD7B652.png" manifest:media-type="image/png"/>
  <manifest:file-entry manifest:full-path="Pictures/100000000000028000000200A9F7C7C6.png" manifest:media-type="image/png"/>
  <manifest:file-entry manifest:full-path="Pictures/100000000000028000000200032BC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29b9" officeooo:paragraph-rsid="000829b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829b9" officeooo:paragraph-rsid="000829b9"/>
    </style:style>
    <style:style style:name="P3" style:family="paragraph" style:parent-style-name="Standard">
      <style:text-properties fo:font-weight="bold" officeooo:rsid="000829b9" officeooo:paragraph-rsid="000829b9" style:font-weight-asian="bold" style:font-weight-complex="bold"/>
    </style:style>
    <style:style style:name="P4" style:family="paragraph" style:parent-style-name="Standard">
      <style:text-properties fo:font-weight="normal" officeooo:rsid="000829b9" officeooo:paragraph-rsid="000829b9" style:font-weight-asian="normal" style:font-weight-complex="normal"/>
    </style:style>
    <style:style style:name="P5" style:family="paragraph" style:parent-style-name="Standard">
      <style:text-properties fo:font-weight="bold" officeooo:rsid="000849f9" officeooo:paragraph-rsid="000849f9" style:font-weight-asian="bold" style:font-weight-complex="bold"/>
    </style:style>
    <style:style style:name="P6" style:family="paragraph" style:parent-style-name="Standard">
      <style:text-properties officeooo:rsid="000849f9" officeooo:paragraph-rsid="000849f9"/>
    </style:style>
    <style:style style:name="P7" style:family="paragraph" style:parent-style-name="Standard">
      <style:paragraph-properties fo:break-before="page"/>
      <style:text-properties officeooo:rsid="000849f9" officeooo:paragraph-rsid="000849f9"/>
    </style:style>
    <style:style style:name="P8" style:family="paragraph" style:parent-style-name="Standard">
      <style:text-properties fo:font-weight="bold" officeooo:rsid="000a2db9" officeooo:paragraph-rsid="000a2db9" style:font-weight-asian="bold" style:font-weight-complex="bold"/>
    </style:style>
    <style:style style:name="P9" style:family="paragraph" style:parent-style-name="Standard">
      <style:text-properties fo:font-weight="normal" officeooo:rsid="000a2db9" officeooo:paragraph-rsid="000a2db9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normal" officeooo:rsid="000a2db9" officeooo:paragraph-rsid="000a2db9" style:font-weight-asian="normal" style:font-weight-complex="normal"/>
    </style:style>
    <style:style style:name="P11" style:family="paragraph" style:parent-style-name="Standard">
      <style:text-properties fo:font-weight="normal" officeooo:rsid="000ff8e2" officeooo:paragraph-rsid="000ff8e2" style:font-weight-asian="normal" style:font-weight-complex="normal"/>
    </style:style>
    <style:style style:name="P12" style:family="paragraph" style:parent-style-name="Standard">
      <style:text-properties fo:font-weight="bold" officeooo:rsid="000ff8e2" officeooo:paragraph-rsid="000ff8e2" style:font-weight-asian="bold" style:font-weight-complex="bold"/>
    </style:style>
    <style:style style:name="P13" style:family="paragraph" style:parent-style-name="Standard">
      <style:text-properties fo:font-weight="normal" officeooo:rsid="0020df85" officeooo:paragraph-rsid="0020df85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ff8e2" officeooo:paragraph-rsid="000ff8e2" style:font-weight-asian="normal" style:font-weight-complex="normal"/>
    </style:style>
    <style:style style:name="P15" style:family="paragraph" style:parent-style-name="Standard">
      <style:text-properties fo:font-weight="normal" officeooo:rsid="000ff8e2" officeooo:paragraph-rsid="00140ebb" style:font-weight-asian="normal" style:font-weight-complex="normal"/>
    </style:style>
    <style:style style:name="P16" style:family="paragraph" style:parent-style-name="Standard">
      <style:text-properties fo:font-weight="normal" officeooo:rsid="00140ebb" officeooo:paragraph-rsid="00140ebb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0ff8e2" officeooo:paragraph-rsid="00140ebb" style:font-weight-asian="normal" style:font-weight-complex="normal"/>
    </style:style>
    <style:style style:name="P18" style:family="paragraph" style:parent-style-name="Standard">
      <style:text-properties fo:font-weight="bold" officeooo:rsid="00147d12" officeooo:paragraph-rsid="00147d12" style:font-weight-asian="bold" style:font-weight-complex="bold"/>
    </style:style>
    <style:style style:name="P19" style:family="paragraph" style:parent-style-name="Standard">
      <style:text-properties fo:font-weight="normal" officeooo:rsid="00147d12" officeooo:paragraph-rsid="00147d12" style:font-weight-asian="normal" style:font-weight-complex="normal"/>
    </style:style>
    <style:style style:name="P20" style:family="paragraph" style:parent-style-name="Standard">
      <style:text-properties fo:font-weight="normal" officeooo:rsid="0015a5b0" officeooo:paragraph-rsid="0015a5b0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15a5b0" officeooo:paragraph-rsid="0015a5b0" style:font-weight-asian="normal" style:font-weight-complex="normal"/>
    </style:style>
    <style:style style:name="P22" style:family="paragraph" style:parent-style-name="Standard">
      <style:text-properties fo:font-weight="bold" officeooo:rsid="0015a5b0" officeooo:paragraph-rsid="0015a5b0" style:font-weight-asian="bold" style:font-weight-complex="bold"/>
    </style:style>
    <style:style style:name="P23" style:family="paragraph" style:parent-style-name="Standard" style:list-style-name="L2">
      <style:text-properties fo:font-weight="normal" officeooo:rsid="0015a5b0" officeooo:paragraph-rsid="0015a5b0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a0a24" officeooo:paragraph-rsid="001a0a24" style:font-weight-asian="normal" style:font-weight-complex="normal"/>
    </style:style>
    <style:style style:name="P25" style:family="paragraph" style:parent-style-name="Standard">
      <style:text-properties fo:font-weight="normal" officeooo:rsid="001a0a24" officeooo:paragraph-rsid="001a0a24" style:font-weight-asian="normal" style:font-weight-complex="normal"/>
    </style:style>
    <style:style style:name="P26" style:family="paragraph" style:parent-style-name="Standard">
      <style:text-properties fo:font-weight="normal" officeooo:rsid="00181b4f" officeooo:paragraph-rsid="00181b4f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181b4f" officeooo:paragraph-rsid="00181b4f" style:font-weight-asian="bold" style:font-weight-complex="bold"/>
    </style:style>
    <style:style style:name="P28" style:family="paragraph" style:parent-style-name="Standard">
      <style:text-properties fo:font-weight="normal" officeooo:rsid="00189cfc" officeooo:paragraph-rsid="00189cfc" style:font-weight-asian="normal" style:font-weight-complex="normal"/>
    </style:style>
    <style:style style:name="P29" style:family="paragraph" style:parent-style-name="Standard">
      <style:text-properties fo:font-weight="normal" officeooo:rsid="00199e4e" officeooo:paragraph-rsid="00199e4e" style:font-weight-asian="normal" style:font-weight-complex="normal"/>
    </style:style>
    <style:style style:name="P30" style:family="paragraph" style:parent-style-name="Standard">
      <style:text-properties fo:font-weight="normal" officeooo:rsid="00244d78" officeooo:paragraph-rsid="00244d78" style:font-weight-asian="normal" style:font-weight-complex="normal"/>
    </style:style>
    <style:style style:name="P31" style:family="paragraph" style:parent-style-name="Standard">
      <style:text-properties fo:font-weight="normal" officeooo:rsid="0024bde0" officeooo:paragraph-rsid="0024bde0" style:font-weight-asian="normal" style:font-weight-complex="normal"/>
    </style:style>
    <style:style style:name="T1" style:family="text">
      <style:text-properties officeooo:rsid="000eb90b"/>
    </style:style>
    <style:style style:name="T2" style:family="text">
      <style:text-properties officeooo:rsid="000cd0f1"/>
    </style:style>
    <style:style style:name="T3" style:family="text">
      <style:text-properties officeooo:rsid="001e04d2"/>
    </style:style>
    <style:style style:name="T4" style:family="text">
      <style:text-properties officeooo:rsid="0021e87c"/>
    </style:style>
    <style:style style:name="T5" style:family="text">
      <style:text-properties officeooo:rsid="00140ebb"/>
    </style:style>
    <style:style style:name="T6" style:family="text">
      <style:text-properties officeooo:rsid="0015a5b0"/>
    </style:style>
    <style:style style:name="T7" style:family="text">
      <style:text-properties officeooo:rsid="00168677"/>
    </style:style>
    <style:style style:name="T8" style:family="text">
      <style:text-properties officeooo:rsid="0018ca50"/>
    </style:style>
    <style:style style:name="T9" style:family="text">
      <style:text-properties officeooo:rsid="002335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cholar</text:p>
      <text:p text:style-name="P1">User Guide</text:p>
      <text:p text:style-name="P1"/>
      <text:p text:style-name="P1"/>
      <text:p text:style-name="P2"/>
      <text:p text:style-name="P2"><draw:frame draw:style-name="fr1" draw:name="Image1" text:anchor-type="char" svg:width="14.914cm" svg:height="11.931cm" draw:z-index="0"><draw:image xlink:href="Pictures/100000000000028000000200032BC3F9.png" xlink:type="simple" xlink:show="embed" xlink:actuate="onLoad" draw:mime-type="image/png"/></draw:frame></text:p>
      <text:p text:style-name="P2"/>
      <text:p text:style-name="P3"/>
      <text:p text:style-name="P3">1. Overview</text:p>
      <text:p text:style-name="P3"/>
      <text:p text:style-name="P4">The Scholar is an anagram puzzle game played against the clock. <text:s/>Lifelines are available to help you out. <text:s/>Each round consists of three anagrams to solve. The anagrams are related, e.g. Carry On Films. </text:p>
      <text:p text:style-name="P4"/>
      <text:p text:style-name="P4">After each round the category changes. Complete eight rounds to win the game. On the start screen (Prospectus) you can select game difficulty by choosing a particular college.</text:p>
      <text:p text:style-name="P2"/>
      <text:p text:style-name="P2"/>
      <text:p text:style-name="P2"/>
      <text:p text:style-name="P5">2. Requirements</text:p>
      <text:p text:style-name="P6"/>
      <text:p text:style-name="P6">ZX Spectrum Next or emulator such as ZEsarUX.</text:p>
      <text:p text:style-name="P6">A mouse is essential, however you can use a Kempston joystick in port 1.</text:p>
      <text:p text:style-name="P6"/>
      <text:p text:style-name="P7"/>
      <text:p text:style-name="P6"/>
      <text:p text:style-name="P8"/>
      <text:p text:style-name="P8"/>
      <text:p text:style-name="P8"/>
      <text:p text:style-name="P8"><draw:frame draw:style-name="fr1" draw:name="Image2" text:anchor-type="char" svg:width="14.914cm" svg:height="11.931cm" draw:z-index="1"><draw:image xlink:href="Pictures/100000000000028000000200A9F7C7C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3. Welcome To Oxbridge University</text:p>
      <text:p text:style-name="P8"/>
      <text:p text:style-name="P9">First select your college by clicking on the right or left arrow buttons</text:p>
      <text:p text:style-name="P8"/>
      <text:p text:style-name="P9">Each college has different time settings and Study Aids available to you. You can hover the mouse over the Study Aids icons to see what they do, <text:span text:style-name="T1">shown above are the Calculator, Beer and Notepad.</text:span></text:p>
      <text:p text:style-name="P9"/>
      <text:p text:style-name="P9"/>
      <text:p text:style-name="P9">When you a<text:span text:style-name="T2">re</text:span> done click anywhere on the background to continue.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11"><draw:frame draw:style-name="fr1" draw:name="Image3" text:anchor-type="char" svg:width="14.914cm" svg:height="11.931cm" draw:z-index="2"><draw:image xlink:href="Pictures/10000000000002800000020078A685B7.png" xlink:type="simple" xlink:show="embed" xlink:actuate="onLoad" draw:mime-type="image/png"/></draw:frame></text:p>
      <text:p text:style-name="P12"/>
      <text:p text:style-name="P12"/>
      <text:p text:style-name="P12"><text:span text:style-name="T3">4. </text:span>Game Play</text:p>
      <text:p text:style-name="P11"/>
      <text:p text:style-name="P11">Click on the letter tiles and drag them to the slots above. Arrange the tiles to solve the anagram.</text:p>
      <text:p text:style-name="P13"><text:span text:style-name="T4">You may also r</text:span>ight-click on a tile to send it directly to the first available slot.</text:p>
      <text:p text:style-name="P11"/>
      <text:p text:style-name="P11">In the top left a timer counts down, if it reaches 0 you will fail the exam and drop out of college.</text:p>
      <text:p text:style-name="P11"/>
      <text:p text:style-name="P11">On the lefthand side are your Study Aids, hover over them to see what each one does:</text:p>
      <text:p text:style-name="P11"/>
      <text:list text:style-name="L1">
        <text:list-item>
          <text:p text:style-name="P14">Calculator – Pick a tile to reveal a matching slot</text:p>
        </text:list-item>
        <text:list-item>
          <text:p text:style-name="P14">Yin and Yang – Pick a slot to reveal a matching tile</text:p>
        </text:list-item>
        <text:list-item>
          <text:p text:style-name="P14">Beer – Picks a random un-slotted tile and matches it to a slot</text:p>
        </text:list-item>
        <text:list-item>
          <text:p text:style-name="P14">Notepad – Gives you a clue for this years set of anagrams</text:p>
        </text:list-item>
      </text:list>
      <text:p text:style-name="P11"/>
      <text:p text:style-name="P11">Use the Study Aids wisely as they cost you time!</text:p>
      <text:p text:style-name="P11"/>
      <text:p text:style-name="P11"/>
      <text:p text:style-name="P15"/>
      <text:p text:style-name="P15"><text:soft-page-break/>Each year has 3 terms, Michaelmas, Hilary and Trinity. Each term has its own anagram to solve, all 3 anagrams are related <text:span text:style-name="T5">(below are names of telescopes)</text:span></text:p>
      <text:p text:style-name="P11"/>
      <text:p text:style-name="P11"/>
      <text:p text:style-name="P11"/>
      <text:p text:style-name="P11"><draw:frame draw:style-name="fr2" draw:name="Image4" text:anchor-type="char" svg:x="0.086cm" svg:y="0.437cm" svg:width="7.463cm" svg:height="5.971cm" draw:z-index="3"><draw:image xlink:href="Pictures/100000000000028000000200DDD7B652.png" xlink:type="simple" xlink:show="embed" xlink:actuate="onLoad" draw:mime-type="image/png"/></draw:frame><draw:frame draw:style-name="fr2" draw:name="Image5" text:anchor-type="char" svg:x="8.308cm" svg:y="0.34cm" svg:width="7.47cm" svg:height="5.976cm" draw:z-index="4"><draw:image xlink:href="Pictures/1000000000000280000002006B5829D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6" text:anchor-type="char" svg:x="2.699cm" svg:y="0.25cm" svg:width="10.485cm" svg:height="8.387cm" draw:z-index="5"><draw:image xlink:href="Pictures/100000000000028000000200EFB8619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The Notepad Study Aid will reveal a clue, there is only 1 clue for the set of 3 anagrams, here the clue is “Telescopes”</text:p>
      <text:p text:style-name="P15"/>
      <text:p text:style-name="P15"/>
      <text:p text:style-name="P15"/>
      <text:p text:style-name="P17"/>
      <text:p text:style-name="P15"/>
      <text:p text:style-name="P15"><draw:frame draw:style-name="fr3" draw:name="Image7" text:anchor-type="char" svg:width="14.914cm" svg:height="11.931cm" draw:z-index="6"><draw:image xlink:href="Pictures/100000000000028000000200789C31C7.png" xlink:type="simple" xlink:show="embed" xlink:actuate="onLoad" draw:mime-type="image/png"/></draw:frame></text:p>
      <text:p text:style-name="P15"/>
      <text:p text:style-name="P15"/>
      <text:p text:style-name="P18"><text:span text:style-name="T3">5. </text:span>End Of Round</text:p>
      <text:p text:style-name="P18"/>
      <text:p text:style-name="P19">A new academic year begins, this means a new subject category is chosen. The start time is reset but is reduced by a set amount. </text:p>
      <text:p text:style-name="P16"/>
      <text:p text:style-name="P19">The subject is randomly chosen and you can press the Re-roll button to chose a different random subject. <text:span text:style-name="T6">Each re-roll has a time penalty.</text:span></text:p>
      <text:p text:style-name="P19"/>
      <text:p text:style-name="P20">There are 8 academic years to complete before you can become a Scholar.</text:p>
      <text:p text:style-name="P16"/>
      <text:p text:style-name="P16"/>
      <text:p text:style-name="P16"/>
      <text:p text:style-name="P21"><draw:frame draw:style-name="fr3" draw:name="Image8" text:anchor-type="char" svg:width="14.914cm" svg:height="11.931cm" draw:z-index="7"><draw:image xlink:href="Pictures/10000000000002800000020071756C90.png" xlink:type="simple" xlink:show="embed" xlink:actuate="onLoad" draw:mime-type="image/png"/></draw:frame></text:p>
      <text:p text:style-name="P20"/>
      <text:p text:style-name="P20"/>
      <text:p text:style-name="P22"><text:span text:style-name="T3">6. </text:span>Tips</text:p>
      <text:p text:style-name="P20"/>
      <text:list text:style-name="L2">
        <text:list-item>
          <text:p text:style-name="P23">Make good use of the <text:span text:style-name="T7">S</text:span>tudy <text:span text:style-name="T7">A</text:span>ids on the left hand side, pay attention to the instruction at the bottom of the screen.</text:p>
        </text:list-item>
        <text:list-item>
          <text:p text:style-name="P23">For an easier game select a college with a larger start time such as St Easy Peaseys</text:p>
        </text:list-item>
        <text:list-item>
          <text:p text:style-name="P23">Only use Notepad once per year as there is only one clue per year</text:p>
        </text:list-item>
        <text:list-item>
          <text:p text:style-name="P23">Each set of puzzles are related, eg famous French scientists, use this knowledge to guess.</text:p>
        </text:list-item>
        <text:list-item>
          <text:p text:style-name="P23">You can change a category by pressing the Re-roll button on the Lecture Notes screen</text:p>
        </text:list-item>
        <text:list-item>
          <text:p text:style-name="P23">Reposition the letters to help you to see the anagram</text:p>
        </text:list-item>
        <text:list-item>
          <text:p text:style-name="P23">The study aids have different time costs, use them wisely.</text:p>
        </text:list-item>
        <text:list-item>
          <text:p text:style-name="P24">Really stuck? Cheat, use my Anagram Solver app:</text:p>
          <text:list>
            <text:list-item>
              <text:p text:style-name="P24">Android: <text:a xlink:type="simple" xlink:href="https://play.google.com/store/apps/details?id=com.pigdogbay.anagramsolver" text:style-name="Internet_20_link" text:visited-style-name="Visited_20_Internet_20_Link">https://play.google.com/store/apps/details?id=com.pigdogbay.anagramsolver</text:a></text:p>
            </text:list-item>
            <text:list-item>
              <text:p text:style-name="P24">iOS: <text:a xlink:type="simple" xlink:href="https://apps.apple.com/app/id973923699" text:style-name="Internet_20_link" text:visited-style-name="Visited_20_Internet_20_Link">https://apps.apple.com/app/id973923699</text:a></text:p>
            </text:list-item>
          </text:list>
        </text:list-item>
      </text:list>
      <text:p text:style-name="P25"/>
      <text:p text:style-name="P20"/>
      <text:p text:style-name="P26">As a challenge try to be a scholar for each of the colleges.</text:p>
      <text:p text:style-name="P26"/>
      <text:p text:style-name="P26"/>
      <text:p text:style-name="P26"/>
      <text:p text:style-name="P27"><text:span text:style-name="T3">7. </text:span>Credits</text:p>
      <text:p text:style-name="P26"/>
      <text:p text:style-name="P26">Game by Pig Dog Bay</text:p>
      <text:p text:style-name="P26">Title Music by RetroSteveUK</text:p>
      <text:p text:style-name="P26">Music composed using NextDAW by Gari Biasillo</text:p>
      <text:p text:style-name="P28">Fonts by Damien Guard</text:p>
      <text:p text:style-name="P29">Testing by Rich ‘ Tufty’ Hollins</text:p>
      <text:p text:style-name="P26"/>
      <text:p text:style-name="P30">Special Thanks to </text:p>
      <text:p text:style-name="P30"/>
      <text:p text:style-name="P30">Graeme Mason for his cracking review (On The ZX Spectrum Nextra #11) and suggesting to use the right mouse button to speed up the placement of tiles.</text:p>
      <text:p text:style-name="P30"/>
      <text:p text:style-name="P30">Mike Mee (Mug UK <text:a xlink:type="simple" xlink:href="https://mug-uk.co.uk/" text:style-name="Internet_20_link" text:visited-style-name="Visited_20_Internet_20_Link">https://mug-uk.co.uk/</text:a>) for pointing out a couple of spelling howlers!</text:p>
      <text:p text:style-name="P30"/>
      <text:p text:style-name="P30">Gentlemen’s Pixel Club for his brilliant comprehensive play through and review</text:p>
      <text:p text:style-name="P30">https://youtu.be/YF0sWCzqgVQ</text:p>
      <text:p text:style-name="P30"/>
      <text:p text:style-name="P30">TJ Ferreira for his very entertaining review, RILE A VIKING is a very acceptable answer!</text:p>
      <text:p text:style-name="P30">https://youtu.be/po0J9jpsSPA</text:p>
      <text:p text:style-name="P26"/>
      <text:p text:style-name="P30">Adrian Sinclair and the Crash team for producing the excellent Nextcade Volume 1</text:p>
      <text:p text:style-name="P26"/>
      <text:p text:style-name="P31">BAPSTARCADE for playing the game on his Next live steam:</text:p>
      <text:p text:style-name="P31"><text:a xlink:type="simple" xlink:href="https://www.twitch.tv/bapstarcade" text:style-name="Internet_20_link" text:visited-style-name="Visited_20_Internet_20_Link">https://www.twitch.tv/bapstarcade</text:a></text:p>
      <text:p text:style-name="P31"/>
      <text:p text:style-name="P26"/>
      <text:p text:style-name="P26">©<text:span text:style-name="T8">MPD Bailey Technology 202</text:span><text:span text:style-name="T9">6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4:50:43.234854726</meta:creation-date>
    <dc:date>2026-07-16T10:42:25.426491987</dc:date>
    <meta:editing-duration>PT19H9M41S</meta:editing-duration>
    <meta:editing-cycles>24</meta:editing-cycles>
    <meta:generator>LibreOffice/24.8.0.3$MacOSX_X86_64 LibreOffice_project/0bdf1299c94fe897b119f97f3c613e9dca6be583</meta:generator>
    <meta:print-date>2025-10-22T10:21:42.996778752</meta:print-date>
    <meta:printed-by>PDF files</meta:printed-by>
    <meta:document-statistic meta:table-count="0" meta:image-count="8" meta:object-count="0" meta:page-count="7" meta:paragraph-count="59" meta:word-count="677" meta:character-count="3804" meta:non-whitespace-character-count="3191"/>
  </office:meta>
</office:document-meta>
</file>